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B2000002A96FA9D53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9.516cm" table:align="left"/>
    </style:style>
    <style:style style:name="Tabela1.A" style:family="table-column">
      <style:table-column-properties style:column-width="2.916cm"/>
    </style:style>
    <style:style style:name="Tabela1.B" style:family="table-column">
      <style:table-column-properties style:column-width="6.6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>
      <style:text-properties officeooo:paragraph-rsid="00046578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able_20_Heading">
      <style:paragraph-properties fo:text-align="justify" style:justify-single-word="false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046578"/>
    </style:style>
    <style:style style:name="T1" style:family="text">
      <style:text-properties officeooo:rsid="0006f1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prawozdanie nr 5 </text:p>
      <text:p text:style-name="Subtitle">Diagram klas UML dla systemu serwisu AGD/RTV </text:p>
      <text:h text:style-name="Heading_20_3" text:outline-level="3">1. Cel sprawozdania</text:h>
      <text:p text:style-name="Text_20_body">Celem sprawozdania jest opracowanie diagramu klas UML dla systemu serwisu AGD i RTV na podstawie:</text:p>
      <text:list text:style-name="L1">
        <text:list-item>
          <text:p text:style-name="P1">analizy biznesowej przedsiębiorstwa, </text:p>
        </text:list-item>
        <text:list-item>
          <text:p text:style-name="P1">przypadków użycia, </text:p>
        </text:list-item>
        <text:list-item>
          <text:p text:style-name="P1">scenariuszy przypadków użycia, </text:p>
        </text:list-item>
        <text:list-item>
          <text:p text:style-name="P2">modelowania analitycznego przygotowanego w poprzednich sprawozdaniach. </text:p>
        </text:list-item>
      </text:list>
      <text:p text:style-name="Text_20_body">Diagram klas umożliwia przedstawienie struktury systemu, klas obiektów oraz relacji pomiędzy nimi.</text:p>
      <text:h text:style-name="Heading_20_3" text:outline-level="3">2. Charakterystyka diagramu klas</text:h>
      <text:p text:style-name="Text_20_body">Diagram klas UML służy do modelowania struktury systemu informatycznego.</text:p>
      <text:p text:style-name="Text_20_body">Diagram zawiera:</text:p>
      <text:list text:style-name="L2">
        <text:list-item>
          <text:p text:style-name="P3">klasy, </text:p>
        </text:list-item>
        <text:list-item>
          <text:p text:style-name="P3">atrybuty, </text:p>
        </text:list-item>
        <text:list-item>
          <text:p text:style-name="P3">operacje, </text:p>
        </text:list-item>
        <text:list-item>
          <text:p text:style-name="P3">związki pomiędzy klasami, </text:p>
        </text:list-item>
        <text:list-item>
          <text:p text:style-name="P3">liczebności relacji, </text:p>
        </text:list-item>
        <text:list-item>
          <text:p text:style-name="P3">dziedziczenie, </text:p>
        </text:list-item>
        <text:list-item>
          <text:p text:style-name="P4">agregacje oraz kompozycje. </text:p>
        </text:list-item>
      </text:list>
      <text:h text:style-name="Heading_20_3" text:outline-level="3">3. Zakres projektowanego systemu</text:h>
      <text:p text:style-name="Text_20_body">Projektowany system wspiera działalność serwisu AGD/RTV w zakresie:</text:p>
      <text:list text:style-name="L3">
        <text:list-item>
          <text:p text:style-name="P5">rejestracji klientów, </text:p>
        </text:list-item>
        <text:list-item>
          <text:p text:style-name="P5">przyjmowania zgłoszeń serwisowych, </text:p>
        </text:list-item>
        <text:list-item>
          <text:p text:style-name="P5">diagnostyki usterek, </text:p>
        </text:list-item>
        <text:list-item>
          <text:p text:style-name="P5">realizacji napraw, </text:p>
        </text:list-item>
        <text:list-item>
          <text:p text:style-name="P5">zarządzania częściami zamiennymi, </text:p>
        </text:list-item>
        <text:list-item>
          <text:p text:style-name="P5">obsługi reklamacji, </text:p>
        </text:list-item>
        <text:list-item>
          <text:p text:style-name="P6">archiwizacji zleceń serwisowych.</text:p>
        </text:list-item>
      </text:list>
      <text:h text:style-name="Heading_20_3" text:outline-level="3">4. Identyfikacja klas systemu</text:h>
      <text:p text:style-name="P7">Na podstawie wcześniejszych analiz wyodrębniono następujące klasy systemowe.</text:p>
      <text:p text:style-name="Text_20_body"/>
      <text:p text:style-name="Text_20_body"/>
      <text:h text:style-name="Heading_20_3" text:outline-level="3"><text:soft-page-break/>5. Klasy główne systemu</text:h>
      <text:p text:style-name="P8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9">Klasa</text:p>
            </table:table-cell>
            <table:table-cell table:style-name="Tabela1.A1" office:value-type="string">
              <text:p text:style-name="P9">Opis</text:p>
            </table:table-cell>
          </table:table-row>
        </table:table-header-rows>
        <table:table-row>
          <table:table-cell table:style-name="Tabela1.A1" office:value-type="string">
            <text:p text:style-name="P10">Klient</text:p>
          </table:table-cell>
          <table:table-cell table:style-name="Tabela1.A1" office:value-type="string">
            <text:p text:style-name="P10">Dane klienta serwisu</text:p>
          </table:table-cell>
        </table:table-row>
        <table:table-row>
          <table:table-cell table:style-name="Tabela1.A1" office:value-type="string">
            <text:p text:style-name="P10">Pracownik</text:p>
          </table:table-cell>
          <table:table-cell table:style-name="Tabela1.A1" office:value-type="string">
            <text:p text:style-name="P10">Dane pracownika serwisu</text:p>
          </table:table-cell>
        </table:table-row>
        <table:table-row>
          <table:table-cell table:style-name="Tabela1.A1" office:value-type="string">
            <text:p text:style-name="P10">Administrator</text:p>
          </table:table-cell>
          <table:table-cell table:style-name="Tabela1.A1" office:value-type="string">
            <text:p text:style-name="P10">Dane administratora</text:p>
          </table:table-cell>
        </table:table-row>
        <table:table-row>
          <table:table-cell table:style-name="Tabela1.A1" office:value-type="string">
            <text:p text:style-name="P10">Urządzenie</text:p>
          </table:table-cell>
          <table:table-cell table:style-name="Tabela1.A1" office:value-type="string">
            <text:p text:style-name="P10">Dane urządzenia AGD/RTV</text:p>
          </table:table-cell>
        </table:table-row>
        <table:table-row>
          <table:table-cell table:style-name="Tabela1.A1" office:value-type="string">
            <text:p text:style-name="P10">Zgłoszenie</text:p>
          </table:table-cell>
          <table:table-cell table:style-name="Tabela1.A1" office:value-type="string">
            <text:p text:style-name="P10">Informacje o zgłoszeniu serwisowym</text:p>
          </table:table-cell>
        </table:table-row>
        <table:table-row>
          <table:table-cell table:style-name="Tabela1.A1" office:value-type="string">
            <text:p text:style-name="P10">Naprawa</text:p>
          </table:table-cell>
          <table:table-cell table:style-name="Tabela1.A1" office:value-type="string">
            <text:p text:style-name="P10">Informacje o wykonanej naprawie</text:p>
          </table:table-cell>
        </table:table-row>
        <table:table-row>
          <table:table-cell table:style-name="Tabela1.A1" office:value-type="string">
            <text:p text:style-name="P10">Reklamacja</text:p>
          </table:table-cell>
          <table:table-cell table:style-name="Tabela1.A1" office:value-type="string">
            <text:p text:style-name="P10">Dane reklamacji</text:p>
          </table:table-cell>
        </table:table-row>
        <table:table-row>
          <table:table-cell table:style-name="Tabela1.A1" office:value-type="string">
            <text:p text:style-name="P10">CzęśćZamienna</text:p>
          </table:table-cell>
          <table:table-cell table:style-name="Tabela1.A1" office:value-type="string">
            <text:p text:style-name="P10">Dane części magazynowych</text:p>
          </table:table-cell>
        </table:table-row>
        <table:table-row>
          <table:table-cell table:style-name="Tabela1.A1" office:value-type="string">
            <text:p text:style-name="P10">Magazyn</text:p>
          </table:table-cell>
          <table:table-cell table:style-name="Tabela1.A1" office:value-type="string">
            <text:p text:style-name="P10">Informacje o stanie części</text:p>
          </table:table-cell>
        </table:table-row>
        <table:table-row>
          <table:table-cell table:style-name="Tabela1.A1" office:value-type="string">
            <text:p text:style-name="P10">Faktura</text:p>
          </table:table-cell>
          <table:table-cell table:style-name="Tabela1.A1" office:value-type="string">
            <text:p text:style-name="P10">Dane dokumentu sprzedaży</text:p>
          </table:table-cell>
        </table:table-row>
        <table:table-row>
          <table:table-cell table:style-name="Tabela1.A1" office:value-type="string">
            <text:p text:style-name="P10">PozycjaFaktury</text:p>
          </table:table-cell>
          <table:table-cell table:style-name="Tabela1.A1" office:value-type="string">
            <text:p text:style-name="P10">Pozycje faktury</text:p>
          </table:table-cell>
        </table:table-row>
      </table:table>
      <text:p text:style-name="P11"/>
      <text:h text:style-name="Heading_20_3" text:outline-level="3"><text:span text:style-name="T1">6</text:span>. Diagram klas konceptualny </text:h>
      <text:p text:style-name="Text_20_body"><draw:frame draw:style-name="fr1" draw:name="Obraz1" text:anchor-type="paragraph" svg:x="1.63cm" svg:y="0.423cm" svg:width="13.741cm" svg:height="13.561cm" draw:z-index="0"><draw:image xlink:href="Pictures/10000001000002B2000002A96FA9D53C.png" xlink:type="simple" xlink:show="embed" xlink:actuate="onLoad" draw:mime-type="image/png"/></draw:frame>Rys. Diagram klas konceptualnych systemu serwisu AGD/RTV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5T21:21:09.186612100</meta:creation-date>
    <dc:date>2026-05-27T00:09:53.695175100</dc:date>
    <meta:editing-duration>PT5M41S</meta:editing-duration>
    <meta:editing-cycles>4</meta:editing-cycles>
    <meta:generator>LibreOffice/26.2.1.2$Windows_X86_64 LibreOffice_project/620$Build-2</meta:generator>
    <meta:document-statistic meta:table-count="1" meta:image-count="1" meta:object-count="0" meta:page-count="2" meta:paragraph-count="57" meta:word-count="201" meta:character-count="1555" meta:non-whitespace-character-count="1408"/>
  </office:meta>
</office:document-meta>
</file>