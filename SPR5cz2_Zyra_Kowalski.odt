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B2000002A96FA9D53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Heading_20_3">
      <style:paragraph-properties fo:margin-top="0cm" fo:margin-bottom="0.247cm" style:contextual-spacing="false" fo:line-height="115%"/>
    </style:style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T1" style:family="text">
      <style:text-properties officeooo:rsid="0014446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prawozdanie nr 5.2 </text:p>
      <text:p text:style-name="Subtitle">Diagram klas implementacyjny UML dla systemu serwisu AGD/RTV </text:p>
      <text:h text:style-name="Heading_20_3" text:outline-level="3">1. Cel sprawozdania</text:h>
      <text:p text:style-name="Text_20_body">Celem sprawozdania jest opracowanie implementacyjnego diagramu klas UML dla systemu serwisu AGD/RTV.</text:p>
      <text:p text:style-name="Text_20_body">Diagram implementacyjny stanowi rozszerzenie diagramu konceptualnego przygotowanego w poprzednim sprawozdaniu i zawiera:</text:p>
      <text:list text:style-name="L1">
        <text:list-item>
          <text:p text:style-name="P1">typy danych, </text:p>
        </text:list-item>
        <text:list-item>
          <text:p text:style-name="P1">widoczność atrybutów i metod, </text:p>
        </text:list-item>
        <text:list-item>
          <text:p text:style-name="P1">operacje klas, </text:p>
        </text:list-item>
        <text:list-item>
          <text:p text:style-name="P1">relacje pomiędzy klasami, </text:p>
        </text:list-item>
        <text:list-item>
          <text:p text:style-name="P2">zależności i dziedziczenie. </text:p>
        </text:list-item>
      </text:list>
      <text:h text:style-name="Heading_20_3" text:outline-level="3">2. Charakterystyka diagramu implementacyjnego</text:h>
      <text:p text:style-name="Text_20_body">Diagram implementacyjny przedstawia szczegółową strukturę projektowanego systemu.</text:p>
      <text:p text:style-name="Text_20_body">W odróżnieniu od diagramu konceptualnego zawiera:</text:p>
      <text:list text:style-name="L2">
        <text:list-item>
          <text:p text:style-name="P3">typy danych atrybutów, </text:p>
        </text:list-item>
        <text:list-item>
          <text:p text:style-name="P3">widoczność elementów klasy, </text:p>
        </text:list-item>
        <text:list-item>
          <text:p text:style-name="P3">operacje publiczne i prywatne, </text:p>
        </text:list-item>
        <text:list-item>
          <text:p text:style-name="P4">bardziej szczegółowe relacje UML.</text:p>
        </text:list-item>
      </text:list>
      <text:h text:style-name="Heading_20_3" text:outline-level="3"><text:span text:style-name="T1">3</text:span>. Relacje pomiędzy klasami</text:h>
      <text:h text:style-name="P5" text:outline-level="3">Klient — Zgłoszenie</text:h>
      <text:list text:style-name="L3">
        <text:list-item>
          <text:p text:style-name="P6">Jeden klient może posiadać wiele zgłoszeń. </text:p>
        </text:list-item>
        <text:list-item>
          <text:p text:style-name="P7">Jedno zgłoszenie należy do jednego klienta. </text:p>
        </text:list-item>
      </text:list>
      <text:h text:style-name="P5" text:outline-level="3">Zgłoszenie — Urządzenie</text:h>
      <text:list text:style-name="L4">
        <text:list-item>
          <text:p text:style-name="P8">Jedno zgłoszenie dotyczy jednego urządzenia. </text:p>
        </text:list-item>
      </text:list>
      <text:h text:style-name="P5" text:outline-level="3">Pracownik — Naprawa</text:h>
      <text:list text:style-name="L5">
        <text:list-item>
          <text:p text:style-name="P9">Jeden pracownik może realizować wiele napraw. </text:p>
        </text:list-item>
      </text:list>
      <text:h text:style-name="P5" text:outline-level="3">Naprawa — CzęśćZamienna</text:h>
      <text:list text:style-name="L6">
        <text:list-item>
          <text:p text:style-name="P10">Jedna naprawa może wykorzystywać wiele części.</text:p>
        </text:list-item>
      </text:list>
      <text:p text:style-name="Text_20_body"/>
      <text:p text:style-name="Text_20_body"/>
      <text:p text:style-name="Text_20_body"><text:soft-page-break/></text:p>
      <text:p text:style-name="Text_20_body"><draw:frame draw:style-name="fr1" draw:name="Obraz1" text:anchor-type="paragraph" svg:width="14.605cm" svg:height="14.415cm" draw:z-index="0"><draw:image xlink:href="Pictures/10000001000002B2000002A96FA9D53C.png" xlink:type="simple" xlink:show="embed" xlink:actuate="onLoad" draw:mime-type="image/png"/></draw:frame>Diagram przedstawia implementacyjną strukturę klas systemu wraz z relacjami pomiędzy obiektami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5T21:24:21.832415700</meta:creation-date>
    <dc:date>2026-05-27T00:11:05.720037700</dc:date>
    <meta:editing-duration>PT11M56S</meta:editing-duration>
    <meta:editing-cycles>3</meta:editing-cycles>
    <meta:generator>LibreOffice/26.2.1.2$Windows_X86_64 LibreOffice_project/620$Build-2</meta:generator>
    <meta:document-statistic meta:table-count="0" meta:image-count="1" meta:object-count="0" meta:page-count="2" meta:paragraph-count="28" meta:word-count="149" meta:character-count="1166" meta:non-whitespace-character-count="1041"/>
  </office:meta>
</office:document-meta>
</file>