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ytuł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/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/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/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>
      <style:paragraph-properties fo:margin-bottom="0in"/>
    </style:style>
    <style:style style:name="P24" style:parent-style-name="Textbody" style:family="paragraph"/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P31" style:parent-style-name="Textbody" style:family="paragraph">
      <style:paragraph-properties fo:margin-bottom="0in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/>
    <style:style style:name="P34" style:parent-style-name="Textbody" style:family="paragraph">
      <style:paragraph-properties fo:margin-bottom="0in"/>
    </style:style>
    <style:style style:name="P35" style:parent-style-name="Textbody" style:family="paragraph">
      <style:paragraph-properties fo:margin-bottom="0in"/>
    </style:style>
    <style:style style:name="P36" style:parent-style-name="Textbody" style:family="paragraph">
      <style:paragraph-properties fo:margin-bottom="0in"/>
    </style:style>
    <style:style style:name="P37" style:parent-style-name="Textbody" style:family="paragraph">
      <style:paragraph-properties fo:margin-bottom="0in"/>
    </style:style>
    <style:style style:name="P38" style:parent-style-name="Textbody" style:family="paragraph"/>
    <style:style style:name="P39" style:parent-style-name="Textbody" style:family="paragraph">
      <style:paragraph-properties fo:margin-bottom="0in"/>
    </style:style>
    <style:style style:name="P40" style:parent-style-name="Textbody" style:family="paragraph">
      <style:paragraph-properties fo:margin-bottom="0in"/>
    </style:style>
    <style:style style:name="P41" style:parent-style-name="Textbody" style:family="paragraph">
      <style:paragraph-properties fo:margin-bottom="0in"/>
    </style:style>
    <style:style style:name="P42" style:parent-style-name="Textbody" style:family="paragraph">
      <style:paragraph-properties fo:margin-bottom="0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/>
    <style:style style:name="P45" style:parent-style-name="Textbody" style:family="paragraph">
      <style:paragraph-properties fo:margin-bottom="0in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>
      <style:paragraph-properties fo:margin-bottom="0in"/>
    </style:style>
    <style:style style:name="P48" style:parent-style-name="Textbody" style:family="paragraph">
      <style:paragraph-properties fo:margin-bottom="0in"/>
    </style:style>
    <style:style style:name="P49" style:parent-style-name="Textbody" style:family="paragraph"/>
    <style:style style:name="P50" style:parent-style-name="Textbody" style:family="paragraph">
      <style:paragraph-properties fo:margin-bottom="0in"/>
    </style:style>
    <style:style style:name="P51" style:parent-style-name="Textbody" style:family="paragraph">
      <style:paragraph-properties fo:margin-bottom="0in"/>
    </style:style>
    <style:style style:name="P52" style:parent-style-name="Textbody" style:family="paragraph">
      <style:paragraph-properties fo:margin-bottom="0in"/>
    </style:style>
    <style:style style:name="P53" style:parent-style-name="Textbody" style:family="paragraph">
      <style:paragraph-properties fo:margin-bottom="0in"/>
    </style:style>
    <style:style style:name="P54" style:parent-style-name="Textbody" style:family="paragraph"/>
    <style:style style:name="P55" style:parent-style-name="Textbody" style:family="paragraph">
      <style:paragraph-properties fo:margin-bottom="0in"/>
    </style:style>
    <style:style style:name="P56" style:parent-style-name="Textbody" style:family="paragraph">
      <style:paragraph-properties fo:margin-bottom="0in"/>
    </style:style>
    <style:style style:name="P57" style:parent-style-name="Textbody" style:family="paragraph">
      <style:paragraph-properties fo:margin-bottom="0in"/>
    </style:style>
    <style:style style:name="P58" style:parent-style-name="Textbody" style:family="paragraph">
      <style:paragraph-properties fo:margin-bottom="0in"/>
    </style:style>
    <style:style style:name="P59" style:parent-style-name="Textbody" style:family="paragraph"/>
    <style:style style:name="P60" style:parent-style-name="Textbody" style:family="paragraph">
      <style:paragraph-properties fo:margin-bottom="0in"/>
    </style:style>
    <style:style style:name="P61" style:parent-style-name="Textbody" style:family="paragraph">
      <style:paragraph-properties fo:margin-bottom="0in"/>
    </style:style>
    <style:style style:name="P62" style:parent-style-name="Textbody" style:family="paragraph">
      <style:paragraph-properties fo:margin-bottom="0in"/>
    </style:style>
    <style:style style:name="P63" style:parent-style-name="Textbody" style:family="paragraph">
      <style:paragraph-properties fo:margin-bottom="0in"/>
    </style:style>
    <style:style style:name="P64" style:parent-style-name="Textbody" style:family="paragraph"/>
    <style:style style:name="P65" style:parent-style-name="Textbody" style:family="paragraph">
      <style:paragraph-properties fo:margin-bottom="0in"/>
    </style:style>
    <style:style style:name="P66" style:parent-style-name="Textbody" style:family="paragraph">
      <style:paragraph-properties fo:margin-bottom="0in"/>
    </style:style>
    <style:style style:name="P67" style:parent-style-name="Textbody" style:family="paragraph"/>
    <style:style style:name="P68" style:parent-style-name="Textbody" style:family="paragraph">
      <style:paragraph-properties fo:margin-bottom="0in"/>
    </style:style>
    <style:style style:name="P69" style:parent-style-name="Textbody" style:family="paragraph">
      <style:paragraph-properties fo:margin-bottom="0in"/>
    </style:style>
    <style:style style:name="P70" style:parent-style-name="Textbody" style:family="paragraph">
      <style:paragraph-properties fo:margin-bottom="0in"/>
    </style:style>
    <style:style style:name="P71" style:parent-style-name="Textbody" style:family="paragraph">
      <style:paragraph-properties fo:margin-bottom="0in"/>
    </style:style>
    <style:style style:name="P72" style:parent-style-name="Textbody" style:family="paragraph"/>
    <style:style style:name="P73" style:parent-style-name="Textbody" style:family="paragraph">
      <style:paragraph-properties fo:margin-bottom="0in"/>
    </style:style>
    <style:style style:name="P74" style:parent-style-name="Textbody" style:family="paragraph">
      <style:paragraph-properties fo:margin-bottom="0in"/>
    </style:style>
    <style:style style:name="P75" style:parent-style-name="Textbody" style:family="paragraph">
      <style:paragraph-properties fo:margin-bottom="0in"/>
    </style:style>
    <style:style style:name="P76" style:parent-style-name="Textbody" style:family="paragraph"/>
    <style:style style:name="P77" style:parent-style-name="Textbody" style:family="paragraph">
      <style:paragraph-properties fo:margin-bottom="0in"/>
    </style:style>
    <style:style style:name="P78" style:parent-style-name="Textbody" style:family="paragraph">
      <style:paragraph-properties fo:margin-bottom="0in"/>
    </style:style>
    <style:style style:name="P79" style:parent-style-name="Textbody" style:family="paragraph">
      <style:paragraph-properties fo:margin-bottom="0in"/>
    </style:style>
    <style:style style:name="P80" style:parent-style-name="Textbody" style:family="paragraph">
      <style:paragraph-properties fo:margin-bottom="0in"/>
    </style:style>
    <style:style style:name="P81" style:parent-style-name="Textbody" style:family="paragraph">
      <style:paragraph-properties fo:margin-bottom="0in"/>
    </style:style>
    <style:style style:name="P82" style:parent-style-name="Textbody" style:family="paragraph"/>
    <style:style style:name="P83" style:parent-style-name="Textbody" style:family="paragraph">
      <style:paragraph-properties fo:margin-bottom="0in"/>
    </style:style>
    <style:style style:name="P84" style:parent-style-name="Textbody" style:family="paragraph">
      <style:paragraph-properties fo:margin-bottom="0in"/>
    </style:style>
    <style:style style:name="P85" style:parent-style-name="Textbody" style:family="paragraph">
      <style:paragraph-properties fo:margin-bottom="0in"/>
    </style:style>
    <style:style style:name="P86" style:parent-style-name="Textbody" style:family="paragraph">
      <style:paragraph-properties fo:margin-bottom="0in"/>
    </style:style>
    <style:style style:name="P87" style:parent-style-name="Textbody" style:family="paragraph">
      <style:paragraph-properties fo:margin-bottom="0in"/>
    </style:style>
    <style:style style:name="P88" style:parent-style-name="Textbody" style:family="paragraph">
      <style:paragraph-properties fo:margin-bottom="0in"/>
    </style:style>
    <style:style style:name="P89" style:parent-style-name="Textbody" style:family="paragraph"/>
    <style:style style:name="P90" style:parent-style-name="Normalny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Sprawozdanie nr 8</text:p>
      <text:p text:style-name="Podtytuł">Prototyp systemu serwisu AGD/RTV oraz ocena interfejsu użytkownika</text:p>
      <text:h text:style-name="Nagłówek3" text:outline-level="3">1. Cel sprawozdania</text:h>
      <text:p text:style-name="Textbody">Celem sprawozdania jest przygotowanie prototypu interfejsu użytkownika systemu serwisu AGD/RTV oraz przeprowadzenie oceny funkcjonalności i użyteczności zaprojektowanego GUI.</text:p>
      <text:p text:style-name="Textbody">Projekt został wykonany na podstawie:</text:p>
      <text:list text:style-name="LFO1" text:continue-numbering="true">
        <text:list-item>
          <text:p text:style-name="P2">wcześniejszych modeli analitycznych,</text:p>
        </text:list-item>
        <text:list-item>
          <text:p text:style-name="P3">diagramów przypadków użycia,</text:p>
        </text:list-item>
        <text:list-item>
          <text:p text:style-name="P4">projektu bazy danych,</text:p>
        </text:list-item>
        <text:list-item>
          <text:p text:style-name="P5">projektu GUI,</text:p>
        </text:list-item>
        <text:list-item>
          <text:p text:style-name="P6">zasad projektowania UI/UX.</text:p>
        </text:list-item>
      </text:list>
      <text:h text:style-name="Nagłówek3" text:outline-level="3">2. Założenia projektowe prototypu</text:h>
      <text:p text:style-name="Textbody">Prototyp systemu ma umożliwiać:</text:p>
      <text:list text:style-name="LFO2" text:continue-numbering="true">
        <text:list-item>
          <text:p text:style-name="P7">obsługę klientów,</text:p>
        </text:list-item>
        <text:list-item>
          <text:p text:style-name="P8">rejestrację zgłoszeń serwisowych,</text:p>
        </text:list-item>
        <text:list-item>
          <text:p text:style-name="P9">zarządzanie naprawami,</text:p>
        </text:list-item>
        <text:list-item>
          <text:p text:style-name="P10">zarządzanie magazynem części,</text:p>
        </text:list-item>
        <text:list-item>
          <text:p text:style-name="P11">obsługę reklamacji,</text:p>
        </text:list-item>
        <text:list-item>
          <text:p text:style-name="P12">wystawianie faktur,</text:p>
        </text:list-item>
        <text:list-item>
          <text:p text:style-name="P13">administrację systemem.</text:p>
        </text:list-item>
      </text:list>
      <text:p text:style-name="Textbody">Projekt prototypu wykonano zgodnie z zasadami:</text:p>
      <text:list text:style-name="LFO3" text:continue-numbering="true">
        <text:list-item>
          <text:p text:style-name="P14">spójności interfejsu,</text:p>
        </text:list-item>
        <text:list-item>
          <text:p text:style-name="P15">czytelności,</text:p>
        </text:list-item>
        <text:list-item>
          <text:p text:style-name="P16">prostoty obsługi,</text:p>
        </text:list-item>
        <text:list-item>
          <text:p text:style-name="P17">ergonomii pracy użytkownika.</text:p>
        </text:list-item>
      </text:list>
      <text:h text:style-name="Nagłówek3" text:outline-level="3">3. Charakterystyka prototypu</text:h>
      <text:p text:style-name="Textbody">Prototyp przedstawia wygląd oraz sposób działania najważniejszych ekranów systemu.</text:p>
      <text:p text:style-name="Textbody">W projekcie wykorzystano:</text:p>
      <text:list text:style-name="LFO4" text:continue-numbering="true">
        <text:list-item>
          <text:p text:style-name="P18">formularze GUI,</text:p>
        </text:list-item>
        <text:list-item>
          <text:p text:style-name="P19">menu nawigacyjne,</text:p>
        </text:list-item>
        <text:list-item>
          <text:p text:style-name="P20">przyciski akcji,</text:p>
        </text:list-item>
        <text:list-item>
          <text:p text:style-name="P21">tabele danych,</text:p>
        </text:list-item>
        <text:list-item>
          <text:p text:style-name="P22">okna dialogowe,</text:p>
        </text:list-item>
        <text:list-item>
          <text:p text:style-name="P23">listy rozwijane,</text:p>
        </text:list-item>
        <text:list-item>
          <text:p text:style-name="P24">kontrolki formularzy.</text:p>
        </text:list-item>
      </text:list>
      <text:soft-page-break/>
      <text:h text:style-name="Nagłówek3" text:outline-level="3">4. Architektura interfejsu użytkownika</text:h>
      <text:p text:style-name="Textbody">Interfejs systemu podzielono na moduły:</text:p>
      <text:list text:style-name="LFO5" text:continue-numbering="true">
        <text:list-item>
          <text:p text:style-name="P25">Logowanie</text:p>
        </text:list-item>
        <text:list-item>
          <text:p text:style-name="P26">Dashboard</text:p>
        </text:list-item>
        <text:list-item>
          <text:p text:style-name="P27">Klienci</text:p>
        </text:list-item>
        <text:list-item>
          <text:p text:style-name="P28">Zgłoszenia serwisowe</text:p>
        </text:list-item>
        <text:list-item>
          <text:p text:style-name="P29">Naprawy</text:p>
        </text:list-item>
        <text:list-item>
          <text:p text:style-name="P30">Magazyn części</text:p>
        </text:list-item>
        <text:list-item>
          <text:p text:style-name="P31">Reklamacje</text:p>
        </text:list-item>
        <text:list-item>
          <text:p text:style-name="P32">Faktury</text:p>
        </text:list-item>
        <text:list-item>
          <text:p text:style-name="P33">Panel administratora</text:p>
        </text:list-item>
      </text:list>
      <text:h text:style-name="Nagłówek3" text:outline-level="3"/>
      <text:h text:style-name="Nagłówek3" text:outline-level="3">5. Projekt ekranu głównego systemu</text:h>
      <text:h text:style-name="Nagłówek3" text:outline-level="3">Opis</text:h>
      <text:p text:style-name="Textbody">Ekran główny pełni rolę dashboardu systemu.</text:p>
      <text:p text:style-name="Textbody">Zawiera:</text:p>
      <text:list text:style-name="LFO6" text:continue-numbering="true">
        <text:list-item>
          <text:p text:style-name="P34">menu nawigacyjne,</text:p>
        </text:list-item>
        <text:list-item>
          <text:p text:style-name="P35">panel szybkiego dostępu,</text:p>
        </text:list-item>
        <text:list-item>
          <text:p text:style-name="P36">listę aktualnych zgłoszeń,</text:p>
        </text:list-item>
        <text:list-item>
          <text:p text:style-name="P37">statystyki serwisu,</text:p>
        </text:list-item>
        <text:list-item>
          <text:p text:style-name="P38">powiadomienia systemowe.</text:p>
        </text:list-item>
      </text:list>
      <text:p text:style-name="Standard"/>
      <text:h text:style-name="Nagłówek3" text:outline-level="3">6. Projekt prototypu zgłoszenia serwisowego</text:h>
      <text:h text:style-name="Nagłówek3" text:outline-level="3">Opis</text:h>
      <text:p text:style-name="Textbody">Formularz służy do przyjmowania zgłoszeń serwisowych.</text:p>
      <text:h text:style-name="Nagłówek3" text:outline-level="3">Funkcje formularza</text:h>
      <text:list text:style-name="LFO7" text:continue-numbering="true">
        <text:list-item>
          <text:p text:style-name="P39">wybór klienta,</text:p>
        </text:list-item>
        <text:list-item>
          <text:p text:style-name="P40">wybór urządzenia,</text:p>
        </text:list-item>
        <text:list-item>
          <text:p text:style-name="P41">opis awarii,</text:p>
        </text:list-item>
        <text:list-item>
          <text:p text:style-name="P42">nadanie statusu,</text:p>
        </text:list-item>
        <text:list-item>
          <text:p text:style-name="P43">przypisanie pracownika,</text:p>
        </text:list-item>
        <text:list-item>
          <text:p text:style-name="P44">zapis zgłoszenia.</text:p>
        </text:list-item>
      </text:list>
      <text:h text:style-name="Nagłówek3" text:outline-level="3">7. Projekt prototypu naprawy urządzenia</text:h>
      <text:h text:style-name="Nagłówek3" text:outline-level="3">Opis</text:h>
      <text:p text:style-name="Textbody">Ekran umożliwia obsługę procesu naprawy.</text:p>
      <text:h text:style-name="Nagłówek3" text:outline-level="3">Funkcjonalności</text:h>
      <text:list text:style-name="LFO8" text:continue-numbering="true">
        <text:list-item>
          <text:p text:style-name="P45">dodawanie części,</text:p>
        </text:list-item>
        <text:list-item>
          <text:p text:style-name="P46">wpisanie kosztów,</text:p>
        </text:list-item>
        <text:list-item>
          <text:p text:style-name="P47">zapis wykonanych czynności,</text:p>
        </text:list-item>
        <text:list-item>
          <text:p text:style-name="P48">zmiana statusu naprawy,</text:p>
        </text:list-item>
        <text:list-item>
          <text:p text:style-name="P49">wydruk dokumentu.</text:p>
        </text:list-item>
      </text:list>
      <text:h text:style-name="Nagłówek3" text:outline-level="3">8. Projekt prototypu magazynu części</text:h>
      <text:h text:style-name="Nagłówek3" text:outline-level="3">Opis</text:h>
      <text:p text:style-name="Textbody">Moduł magazynowy umożliwia zarządzanie częściami zamiennymi.</text:p>
      <text:h text:style-name="Nagłówek3" text:outline-level="3">9. Projekt panelu administratora</text:h>
      <text:h text:style-name="Nagłówek3" text:outline-level="3">Opis</text:h>
      <text:p text:style-name="Textbody">Panel administratora umożliwia zarządzanie użytkownikami systemu oraz konfiguracją aplikacji.</text:p>
      <text:h text:style-name="Nagłówek3" text:outline-level="3">10. Ocena użyteczności interfejsu</text:h>
      <text:p text:style-name="Textbody">Przeprowadzono analizę użyteczności interfejsu użytkownika.</text:p>
      <text:p text:style-name="Textbody">Ocenie poddano:</text:p>
      <text:list text:style-name="LFO9" text:continue-numbering="true">
        <text:list-item>
          <text:p text:style-name="P50">intuicyjność obsługi,</text:p>
        </text:list-item>
        <text:list-item>
          <text:p text:style-name="P51">szybkość wykonywania operacji,</text:p>
        </text:list-item>
        <text:list-item>
          <text:p text:style-name="P52">przejrzystość formularzy,</text:p>
        </text:list-item>
        <text:list-item>
          <text:p text:style-name="P53">ergonomię pracy,</text:p>
        </text:list-item>
        <text:list-item>
          <text:p text:style-name="P54">spójność elementów GUI.</text:p>
        </text:list-item>
      </text:list>
      <text:h text:style-name="Nagłówek3" text:outline-level="3">11. Zalety zaprojektowanego GUI</text:h>
      <text:p text:style-name="Textbody">Do głównych zalet interfejsu należą:</text:p>
      <text:list text:style-name="LFO10" text:continue-numbering="true">
        <text:list-item>
          <text:p text:style-name="P55">czytelny układ okien,</text:p>
        </text:list-item>
        <text:list-item>
          <text:p text:style-name="P56">intuicyjna nawigacja,</text:p>
        </text:list-item>
        <text:list-item>
          <text:p text:style-name="P57">logiczne rozmieszczenie elementów,</text:p>
        </text:list-item>
        <text:list-item>
          <text:p text:style-name="P58">szybki dostęp do funkcji systemu,</text:p>
        </text:list-item>
        <text:list-item>
          <text:p text:style-name="P59">ograniczenie liczby operacji użytkownika.</text:p>
        </text:list-item>
      </text:list>
      <text:h text:style-name="Nagłówek3" text:outline-level="3">12. Możliwe usprawnienia</text:h>
      <text:p text:style-name="Textbody">W przyszłości system może zostać rozbudowany o:</text:p>
      <text:list text:style-name="LFO11" text:continue-numbering="true">
        <text:list-item>
          <text:p text:style-name="P60">tryb mobilny,</text:p>
        </text:list-item>
        <text:list-item>
          <text:p text:style-name="P61">integrację z aplikacją webową,</text:p>
        </text:list-item>
        <text:list-item>
          <text:p text:style-name="P62">powiadomienia SMS i e-mail,</text:p>
        </text:list-item>
        <text:list-item>
          <text:p text:style-name="P63">automatyczne raportowanie,</text:p>
        </text:list-item>
        <text:list-item>
          <text:p text:style-name="P64">ciemny motyw interfejsu.</text:p>
        </text:list-item>
      </text:list>
      <text:h text:style-name="Nagłówek3" text:outline-level="3">13. Wireframe i prototyp</text:h>
      <text:p text:style-name="Textbody">W projekcie zastosowano:</text:p>
      <text:list text:style-name="LFO12" text:continue-numbering="true">
        <text:list-item>
          <text:p text:style-name="P65">wireframe low-fidelity,</text:p>
        </text:list-item>
        <text:list-item>
          <text:p text:style-name="P66">mockupy high-fidelity,</text:p>
        </text:list-item>
        <text:list-item>
          <text:p text:style-name="P67">prototypy GUI.</text:p>
        </text:list-item>
      </text:list>
      <text:h text:style-name="Nagłówek3" text:outline-level="3">14. Zalecane diagramy do dodania</text:h>
      <text:p text:style-name="Textbody">Do sprawozdania warto dołączyć:</text:p>
      <text:list text:style-name="LFO13" text:continue-numbering="true">
        <text:list-item>
          <text:p text:style-name="P68">Diagram architektury GUI</text:p>
        </text:list-item>
        <text:list-item>
          <text:p text:style-name="P69">Wireframe dashboardu</text:p>
        </text:list-item>
        <text:list-item>
          <text:p text:style-name="P70">Wireframe formularza zgłoszenia</text:p>
        </text:list-item>
        <text:list-item>
          <text:p text:style-name="P71">Prototyp naprawy</text:p>
        </text:list-item>
        <text:list-item>
          <text:p text:style-name="P72">Diagram przepływu użytkownika</text:p>
        </text:list-item>
      </text:list>
      <text:h text:style-name="Nagłówek3" text:outline-level="3">15. Jak powinny wyglądać diagramy</text:h>
      <text:p text:style-name="Textbody">Diagramy należy przygotować:</text:p>
      <text:list text:style-name="LFO14" text:continue-numbering="true">
        <text:list-item>
          <text:p text:style-name="P73">w draw.io,</text:p>
        </text:list-item>
        <text:list-item>
          <text:p text:style-name="P74">LibreOffice Draw,</text:p>
        </text:list-item>
        <text:list-item>
          <text:p text:style-name="P75">Figma,</text:p>
        </text:list-item>
        <text:list-item>
          <text:p text:style-name="P76">Balsamiq.</text:p>
        </text:list-item>
      </text:list>
      <text:p text:style-name="Textbody">Powinny zawierać:</text:p>
      <text:list text:style-name="LFO15" text:continue-numbering="true">
        <text:list-item>
          <text:p text:style-name="P77">prostokątne okna aplikacji,</text:p>
        </text:list-item>
        <text:list-item>
          <text:p text:style-name="P78">menu,</text:p>
        </text:list-item>
        <text:list-item>
          <text:p text:style-name="P79">przyciski,</text:p>
        </text:list-item>
        <text:list-item>
          <text:p text:style-name="P80">pola formularzy,</text:p>
        </text:list-item>
        <text:list-item>
          <text:p text:style-name="P81">sekcje systemu,</text:p>
        </text:list-item>
        <text:list-item>
          <text:p text:style-name="P82">połączenia pomiędzy ekranami.</text:p>
        </text:list-item>
      </text:list>
      <text:h text:style-name="Nagłówek3" text:outline-level="3"/>
      <text:h text:style-name="Nagłówek3" text:outline-level="3">16. Podsumowanie</text:h>
      <text:p text:style-name="Textbody">W ramach sprawozdania opracowano prototyp interfejsu użytkownika dla systemu serwisu AGD/RTV.</text:p>
      <text:p text:style-name="Textbody">Przygotowano:</text:p>
      <text:list text:style-name="LFO16" text:continue-numbering="true">
        <text:list-item>
          <text:p text:style-name="P83">projekt architektury GUI,</text:p>
        </text:list-item>
        <text:list-item>
          <text:p text:style-name="P84">dashboard systemu,</text:p>
        </text:list-item>
        <text:list-item>
          <text:p text:style-name="P85">formularze obsługi zgłoszeń,</text:p>
        </text:list-item>
        <text:list-item>
          <text:p text:style-name="P86">formularze napraw,</text:p>
        </text:list-item>
        <text:list-item>
          <text:p text:style-name="P87">moduł magazynu,</text:p>
        </text:list-item>
        <text:list-item>
          <text:p text:style-name="P88">panel administratora,</text:p>
        </text:list-item>
        <text:list-item>
          <text:p text:style-name="P89">analizę użyteczności interfejsu.</text:p>
        </text:list-item>
      </text:list>
      <text:p text:style-name="Textbody">Projekt został wykonany zgodnie z zasadami UI/UX oraz wytycznymi dotyczącymi projektowania interfejsów użytkownika.</text:p>
      <text:p text:style-name="Standard"/>
      <text:p text:style-name="Standard"/>
      <text:p text:style-name="Standard"/>
      <text:soft-page-break/>
      <text:p text:style-name="P90"><draw:frame draw:style-name="a0" draw:name="Obraz 2" text:anchor-type="as-char" svg:x="0in" svg:y="0in" svg:width="5.22083in" svg:height="6.25972in" style:rel-width="scale" style:rel-height="scale"><draw:image xlink:href="media/image1.png" xlink:type="simple" xlink:show="embed" xlink:actuate="onLoad"/><svg:title/><svg:desc/></draw:frame></text:p>
      <text:soft-page-break/>
      <text:p text:style-name="Standard"><draw:frame draw:z-index="251658240" draw:style-name="a1" draw:name="Obraz1" text:anchor-type="paragraph" svg:x="-0.56024in" svg:y="0.0937in" svg:width="7.89724in" svg:height="5.74646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tytuł" style:display-name="Podtytuł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ateusz Zyra</dc:creator>
    <meta:creation-date>2026-05-25T21:36:00Z</meta:creation-date>
    <dc:date>2026-05-26T23:58:00Z</dc:date>
    <meta:template xlink:href="Normal" xlink:type="simple"/>
    <meta:editing-cycles>5</meta:editing-cycles>
    <meta:editing-duration>PT660S</meta:editing-duration>
    <meta:document-statistic meta:page-count="6" meta:paragraph-count="7" meta:word-count="534" meta:character-count="3737" meta:row-count="26" meta:non-whitespace-character-count="3210"/>
  </office:meta>
</office:document-meta>
</file>