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0E0000028B487DD2A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Standard">
      <style:text-properties officeooo:paragraph-rsid="000c8691"/>
    </style:style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T1" style:family="text">
      <style:text-properties officeooo:rsid="000d2d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rawozdanie nr 7</text:p>
      <text:p text:style-name="Subtitle">Projekt interfejsu użytkownika systemu serwisu AGD/RTV</text:p>
      <text:h text:style-name="Heading_20_3" text:outline-level="3">1. Cel sprawozdania</text:h>
      <text:p text:style-name="Text_20_body">Celem sprawozdania jest opracowanie projektu interfejsu użytkownika (UI) dla systemu serwisu AGD/RTV opracowanego w poprzednich sprawozdaniach.</text:p>
      <text:p text:style-name="Text_20_body">Projekt interfejsu został przygotowany zgodnie z zasadami projektowania GUI oraz wytycznymi dotyczącymi:</text:p>
      <text:list text:style-name="L1">
        <text:list-item>
          <text:p text:style-name="P1">użyteczności systemu, </text:p>
        </text:list-item>
        <text:list-item>
          <text:p text:style-name="P1">czytelności interfejsu, </text:p>
        </text:list-item>
        <text:list-item>
          <text:p text:style-name="P1">spójności elementów graficznych, </text:p>
        </text:list-item>
        <text:list-item>
          <text:p text:style-name="P2">ergonomii obsługi systemu. </text:p>
        </text:list-item>
      </text:list>
      <text:h text:style-name="Heading_20_3" text:outline-level="3">2. Charakterystyka interfejsu użytkownika</text:h>
      <text:p text:style-name="Text_20_body">Interfejs użytkownika odpowiada za komunikację pomiędzy użytkownikiem a systemem informatycznym. </text:p>
      <text:p text:style-name="Text_20_body">W projektowanym systemie zastosowano:</text:p>
      <text:list text:style-name="L2">
        <text:list-item>
          <text:p text:style-name="P3">interfejs graficzny GUI, </text:p>
        </text:list-item>
        <text:list-item>
          <text:p text:style-name="P3">formularze danych, </text:p>
        </text:list-item>
        <text:list-item>
          <text:p text:style-name="P3">menu nawigacyjne, </text:p>
        </text:list-item>
        <text:list-item>
          <text:p text:style-name="P3">okna dialogowe, </text:p>
        </text:list-item>
        <text:list-item>
          <text:p text:style-name="P3">pola tekstowe, </text:p>
        </text:list-item>
        <text:list-item>
          <text:p text:style-name="P3">listy rozwijane, </text:p>
        </text:list-item>
        <text:list-item>
          <text:p text:style-name="P4">przyciski akcji. </text:p>
        </text:list-item>
      </text:list>
      <text:h text:style-name="Heading_20_3" text:outline-level="3">3. Założenia projektowe</text:h>
      <text:p text:style-name="Text_20_body">Projekt GUI systemu serwisu AGD/RTV powinien:</text:p>
      <text:list text:style-name="L3">
        <text:list-item>
          <text:p text:style-name="P5">umożliwiać szybką obsługę zgłoszeń, </text:p>
        </text:list-item>
        <text:list-item>
          <text:p text:style-name="P5">zapewniać intuicyjną nawigację, </text:p>
        </text:list-item>
        <text:list-item>
          <text:p text:style-name="P5">minimalizować liczbę kliknięć, </text:p>
        </text:list-item>
        <text:list-item>
          <text:p text:style-name="P5">umożliwiać łatwe wyszukiwanie danych, </text:p>
        </text:list-item>
        <text:list-item>
          <text:p text:style-name="P5">zapewniać czytelność formularzy, </text:p>
        </text:list-item>
        <text:list-item>
          <text:p text:style-name="P6">zachowywać spójność wizualną. </text:p>
        </text:list-item>
      </text:list>
      <text:h text:style-name="Heading_20_3" text:outline-level="3">4. Użytkownicy systemu</text:h>
      <text:p text:style-name="Text_20_body">System przeznaczony jest dla:</text:p>
      <text:list text:style-name="L4">
        <text:list-item>
          <text:p text:style-name="P7">Klienta </text:p>
        </text:list-item>
        <text:list-item>
          <text:p text:style-name="P7">Pracownika serwisu </text:p>
        </text:list-item>
        <text:list-item>
          <text:p text:style-name="P8">Administratora </text:p>
        </text:list-item>
      </text:list>
      <text:h text:style-name="Heading_20_3" text:outline-level="3"><text:soft-page-break/>5. Główne moduły interfejsu</text:h>
      <text:p text:style-name="Text_20_body">W systemie wyróżniono następujące moduły GUI:</text:p>
      <text:list text:style-name="L5">
        <text:list-item>
          <text:p text:style-name="P9">Logowanie użytkownika </text:p>
        </text:list-item>
        <text:list-item>
          <text:p text:style-name="P9">Rejestracja klienta </text:p>
        </text:list-item>
        <text:list-item>
          <text:p text:style-name="P9">Obsługa zgłoszeń serwisowych </text:p>
        </text:list-item>
        <text:list-item>
          <text:p text:style-name="P9">Diagnostyka usterek </text:p>
        </text:list-item>
        <text:list-item>
          <text:p text:style-name="P9">Zarządzanie naprawami </text:p>
        </text:list-item>
        <text:list-item>
          <text:p text:style-name="P9">Zarządzanie częściami zamiennymi </text:p>
        </text:list-item>
        <text:list-item>
          <text:p text:style-name="P9">Reklamacje </text:p>
        </text:list-item>
        <text:list-item>
          <text:p text:style-name="P9">Generowanie faktur </text:p>
        </text:list-item>
        <text:list-item>
          <text:p text:style-name="P10">Panel administratora </text:p>
        </text:list-item>
      </text:list>
      <text:h text:style-name="Heading_20_3" text:outline-level="3">6. Projekt menu głównego</text:h>
      <text:h text:style-name="Heading_20_3" text:outline-level="3">Opis</text:h>
      <text:p text:style-name="Text_20_body">Menu główne umożliwia przechodzenie pomiędzy modułami systemu.</text:p>
      <text:p text:style-name="Text_20_body">Zastosowano:</text:p>
      <text:list text:style-name="L6">
        <text:list-item>
          <text:p text:style-name="P11">poziomy pasek menu, </text:p>
        </text:list-item>
        <text:list-item>
          <text:p text:style-name="P11">przyciski skrótów, </text:p>
        </text:list-item>
        <text:list-item>
          <text:p text:style-name="P11">panel boczny, </text:p>
        </text:list-item>
        <text:list-item>
          <text:p text:style-name="P12">wyszukiwarkę zgłoszeń. </text:p>
        </text:list-item>
      </text:list>
      <text:h text:style-name="Heading_20_3" text:outline-level="3">7. Diagram menu — opis wyglądu</text:h>
      <text:p text:style-name="Text_20_body">Diagram powinien przedstawiać:</text:p>
      <text:list text:style-name="L7">
        <text:list-item>
          <text:p text:style-name="P13">prostokąt symbolizujący główne okno aplikacji, </text:p>
        </text:list-item>
        <text:list-item>
          <text:p text:style-name="P13">poziomy pasek menu u góry, </text:p>
        </text:list-item>
        <text:list-item>
          <text:p text:style-name="P13">moduły systemu jako przyciski, </text:p>
        </text:list-item>
        <text:list-item>
          <text:p text:style-name="P14">panel użytkownika po prawej stronie. </text:p>
        </text:list-item>
      </text:list>
      <text:p text:style-name="P15"/>
      <text:p text:style-name="P15"/>
      <text:h text:style-name="Heading_20_3" text:outline-level="3"><text:span text:style-name="T1">8</text:span>. Projekt formularza logowania</text:h>
      <text:h text:style-name="Heading_20_3" text:outline-level="3">Opis</text:h>
      <text:p text:style-name="Text_20_body">Formularz logowania umożliwia autoryzację użytkownika systemu.</text:p>
      <text:p text:style-name="Text_20_body">Zawiera:</text:p>
      <text:list text:style-name="L8">
        <text:list-item>
          <text:p text:style-name="P16">pole login, </text:p>
        </text:list-item>
        <text:list-item>
          <text:p text:style-name="P16">pole hasło, </text:p>
        </text:list-item>
        <text:list-item>
          <text:p text:style-name="P16">przycisk „Zaloguj”, </text:p>
        </text:list-item>
        <text:list-item>
          <text:p text:style-name="P17">przycisk „Anuluj”.</text:p>
        </text:list-item>
      </text:list>
      <text:h text:style-name="Heading_20_3" text:outline-level="3"><text:soft-page-break/><text:span text:style-name="T1">9</text:span>. Projekt formularza rejestracji klienta</text:h>
      <text:h text:style-name="Heading_20_3" text:outline-level="3">Opis</text:h>
      <text:p text:style-name="Text_20_body">Formularz umożliwia dodanie nowego klienta do systemu.</text:p>
      <text:h text:style-name="Heading_20_3" text:outline-level="3">Elementy formularza</text:h>
      <text:list text:style-name="L9">
        <text:list-item>
          <text:p text:style-name="P18">imię, </text:p>
        </text:list-item>
        <text:list-item>
          <text:p text:style-name="P18">nazwisko, </text:p>
        </text:list-item>
        <text:list-item>
          <text:p text:style-name="P18">telefon, </text:p>
        </text:list-item>
        <text:list-item>
          <text:p text:style-name="P18">adres, </text:p>
        </text:list-item>
        <text:list-item>
          <text:p text:style-name="P18">adres e-mail, </text:p>
        </text:list-item>
        <text:list-item>
          <text:p text:style-name="P19">przyciski akcji. </text:p>
        </text:list-item>
      </text:list>
      <text:h text:style-name="Heading_20_3" text:outline-level="3"><text:span text:style-name="T1">10</text:span>. Projekt formularza zgłoszenia serwisowego</text:h>
      <text:h text:style-name="Heading_20_3" text:outline-level="3">Opis</text:h>
      <text:p text:style-name="Text_20_body">Formularz umożliwia rejestrację awarii urządzenia.</text:p>
      <text:h text:style-name="Heading_20_3" text:outline-level="3">Elementy formularza</text:h>
      <text:list text:style-name="L10">
        <text:list-item>
          <text:p text:style-name="P20">dane klienta, </text:p>
        </text:list-item>
        <text:list-item>
          <text:p text:style-name="P20">dane urządzenia, </text:p>
        </text:list-item>
        <text:list-item>
          <text:p text:style-name="P20">opis usterki, </text:p>
        </text:list-item>
        <text:list-item>
          <text:p text:style-name="P20">status zgłoszenia, </text:p>
        </text:list-item>
        <text:list-item>
          <text:p text:style-name="P20">termin realizacji, </text:p>
        </text:list-item>
        <text:list-item>
          <text:p text:style-name="P21">przypisanie pracownika.</text:p>
        </text:list-item>
      </text:list>
      <text:p text:style-name="P15"/>
      <text:h text:style-name="Heading_20_3" text:outline-level="3"><text:span text:style-name="T1">11</text:span>. Projekt formularza naprawy</text:h>
      <text:h text:style-name="Heading_20_3" text:outline-level="3">Opis</text:h>
      <text:p text:style-name="Text_20_body">Formularz obsługi napraw umożliwia:</text:p>
      <text:list text:style-name="L11">
        <text:list-item>
          <text:p text:style-name="P22">zapis wykonanych czynności, </text:p>
        </text:list-item>
        <text:list-item>
          <text:p text:style-name="P22">przypisanie części, </text:p>
        </text:list-item>
        <text:list-item>
          <text:p text:style-name="P23">określenie kosztów naprawy.</text:p>
        </text:list-item>
      </text:list>
      <text:p text:style-name="P15"/>
      <text:h text:style-name="Heading_20_3" text:outline-level="3"><text:span text:style-name="T1">12</text:span>. Projekt formularza magazynu części</text:h>
      <text:h text:style-name="Heading_20_3" text:outline-level="3">Opis</text:h>
      <text:p text:style-name="Text_20_body">Formularz służy do zarządzania częściami zamiennymi.</text:p>
      <text:h text:style-name="Heading_20_3" text:outline-level="3"><text:soft-page-break/><text:span text:style-name="T1">13</text:span>. Projekt panelu administratora</text:h>
      <text:h text:style-name="Heading_20_3" text:outline-level="3">Opis</text:h>
      <text:p text:style-name="Text_20_body">Panel administratora umożliwia:</text:p>
      <text:list text:style-name="L12">
        <text:list-item>
          <text:p text:style-name="P24">zarządzanie użytkownikami, </text:p>
        </text:list-item>
        <text:list-item>
          <text:p text:style-name="P24">nadawanie uprawnień, </text:p>
        </text:list-item>
        <text:list-item>
          <text:p text:style-name="P24">podgląd raportów, </text:p>
        </text:list-item>
        <text:list-item>
          <text:p text:style-name="P25">konfigurację systemu.</text:p>
        </text:list-item>
      </text:list>
      <text:p text:style-name="P15"/>
      <text:h text:style-name="Heading_20_3" text:outline-level="3"><text:span text:style-name="T1">14</text:span>. Zastosowane elementy GUI</text:h>
      <text:p text:style-name="Text_20_body">W projekcie wykorzystano:</text:p>
      <text:list text:style-name="L13">
        <text:list-item>
          <text:p text:style-name="P26">pola tekstowe, </text:p>
        </text:list-item>
        <text:list-item>
          <text:p text:style-name="P26">listy rozwijane, </text:p>
        </text:list-item>
        <text:list-item>
          <text:p text:style-name="P26">przyciski, </text:p>
        </text:list-item>
        <text:list-item>
          <text:p text:style-name="P26">etykiety, </text:p>
        </text:list-item>
        <text:list-item>
          <text:p text:style-name="P26">formularze, </text:p>
        </text:list-item>
        <text:list-item>
          <text:p text:style-name="P26">tabele danych, </text:p>
        </text:list-item>
        <text:list-item>
          <text:p text:style-name="P26">okna dialogowe, </text:p>
        </text:list-item>
        <text:list-item>
          <text:p text:style-name="P27"><draw:frame draw:style-name="fr1" draw:name="Obraz1" text:anchor-type="paragraph" svg:x="0.409cm" svg:y="0.681cm" svg:width="16.552cm" svg:height="13.78cm" draw:z-index="0"><draw:image xlink:href="Pictures/100000010000030E0000028B487DD2A3.png" xlink:type="simple" xlink:show="embed" xlink:actuate="onLoad" draw:mime-type="image/png"/></draw:frame>komponenty nawigacyjn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21:31:55.949476300</meta:creation-date>
    <dc:date>2026-05-27T00:15:26.484964100</dc:date>
    <meta:editing-duration>PT11M36S</meta:editing-duration>
    <meta:editing-cycles>3</meta:editing-cycles>
    <meta:generator>LibreOffice/26.2.1.2$Windows_X86_64 LibreOffice_project/620$Build-2</meta:generator>
    <meta:document-statistic meta:table-count="0" meta:image-count="1" meta:object-count="0" meta:page-count="4" meta:paragraph-count="111" meta:word-count="402" meta:character-count="2973" meta:non-whitespace-character-count="2684"/>
  </office:meta>
</office:document-meta>
</file>